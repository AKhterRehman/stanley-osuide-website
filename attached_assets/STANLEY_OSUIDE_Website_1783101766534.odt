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STANLEY OSUIDE</text:p>
      <text:p text:style-name="P2">International Speaker | Leadership Strategist | Investment &amp; Legacy Builder</text:p>
      <text:p text:style-name="P3">Speaking to Leaders, Investors and Institutions Across the World</text:p>
      <text:p text:style-name="Normal">Stanley Osuide is an international speaker, entrepreneur and leadership voice committed to raising transformational leaders, connecting global capital with African opportunities, and inspiring people to build lasting legacy.</text:p>
      <text:p text:style-name="Normal">As Founder and CEO of<text:s/><text:span text:style-name="T4">Africa Investment Gateway Group</text:span>, Founder and CEO of<text:s/><text:span text:style-name="T5">John Chamberlain Sports</text:span>, and Founder and Director of the<text:s/><text:span text:style-name="T6">British International Institute for Leadership and Management</text:span>, Stanley brings a powerful blend of business, leadership, faith, investment, sport and global development experience.</text:p>
      <text:p text:style-name="Normal"><text:span text:style-name="T7">Book Stanley for your next conference, summit, leadership retreat, corporate event or investment forum.</text:span></text:p>
      <text:p text:style-name="Normal">[Book Stanley to Speak]<text:line-break/>[Download Speaker Profile]</text:p>
      <text:p text:style-name="Normal"><draw:custom-shape svg:x="0in" svg:y="0in" svg:width="45.51042in" svg:height="0.00139in" draw:z-index="0" draw:id="id0" draw:style-name="a0" draw:name="Horizontal Line 43" text:anchor-type="as-char"><svg:title/><svg:desc/><draw:enhanced-geometry draw:type="non-primitive" svg:viewBox="0 0 21600 21600" draw:enhanced-path="M 0 0 L 21600 0 21600 21600 0 21600 Z N"/></draw:custom-shape></text:p>
      <text:p text:style-name="P8">About Stanley Osuide</text:p>
      <text:p text:style-name="Normal">Stanley Osuide is a visionary leader, speaker and founder with a passion for developing people, building institutions and creating opportunities across the UK, Africa and the global marketplace.</text:p>
      <text:p text:style-name="Normal">Through Africa Investment Gateway Group, Stanley works to connect governments, investors, family offices and institutions with high-impact opportunities across Africa. Through John Chamberlain Sports, he champions the development of sporting talent and the business of sports. Through the British International Institute for Leadership and Management, he equips leaders with values-driven leadership and management principles.</text:p>
      <text:p text:style-name="Normal">Stanley speaks with authority, clarity and conviction on leadership, investment, legacy, African development, sports enterprise, faith-based leadership and personal transformation.</text:p>
      <text:p text:style-name="Normal"><draw:custom-shape svg:x="0in" svg:y="0in" svg:width="45.51042in" svg:height="0.00139in" draw:z-index="0" draw:id="id1" draw:style-name="a1" draw:name="Horizontal Line 44" text:anchor-type="as-char"><svg:title/><svg:desc/><draw:enhanced-geometry draw:type="non-primitive" svg:viewBox="0 0 21600 21600" draw:enhanced-path="M 0 0 L 21600 0 21600 21600 0 21600 Z N"/></draw:custom-shape></text:p>
      <text:p text:style-name="P9">Signature Speaking Topics</text:p>
      <text:p text:style-name="P10">1. Building Your Leadership Advantage</text:p>
      <text:p text:style-name="Normal">How leaders can develop character, clarity, courage and influence in a changing world.</text:p>
      <text:p text:style-name="P11">2. Africa: The Next Frontier for Global Investment</text:p>
      <text:soft-page-break/>
      <text:p text:style-name="Normal">Why Africa presents one of the greatest opportunities for investors, governments and entrepreneurs.</text:p>
      <text:p text:style-name="P12">3. Legacy Leadership</text:p>
      <text:p text:style-name="Normal">How to build beyond success and create institutions, impact and inheritance for the next generation.</text:p>
      <text:p text:style-name="P13">4. Servant Leadership in Practice</text:p>
      <text:p text:style-name="Normal">Leadership principles rooted in service, humility, responsibility and purpose.</text:p>
      <text:p text:style-name="P14">5. Sport, Talent and Economic Transformation</text:p>
      <text:p text:style-name="Normal">How sports can unlock youth development, investment, education and national pride.</text:p>
      <text:p text:style-name="P15">6. Faith, Purpose and Marketplace Impact</text:p>
      <text:p text:style-name="Normal">How leaders can integrate values, vision and execution to create lasting change.</text:p>
      <text:p text:style-name="Normal"><draw:custom-shape svg:x="0in" svg:y="0in" svg:width="45.51042in" svg:height="0.00139in" draw:z-index="0" draw:id="id2" draw:style-name="a2" draw:name="Horizontal Line 45" text:anchor-type="as-char"><svg:title/><svg:desc/><draw:enhanced-geometry draw:type="non-primitive" svg:viewBox="0 0 21600 21600" draw:enhanced-path="M 0 0 L 21600 0 21600 21600 0 21600 Z N"/></draw:custom-shape></text:p>
      <text:p text:style-name="P16">Ideal Events</text:p>
      <text:p text:style-name="Normal">Stanley is available for:</text:p>
      <text:p text:style-name="Normal">International conferences<text:line-break/>Leadership summits<text:line-break/>Corporate retreats<text:line-break/>Investment forums<text:line-break/>Government and diaspora events<text:line-break/>Faith-based leadership gatherings<text:line-break/>Sports business conferences<text:line-break/>University and youth leadership events<text:line-break/>Awards ceremonies<text:line-break/>Executive roundtables</text:p>
      <text:p text:style-name="Normal"><draw:custom-shape svg:x="0in" svg:y="0in" svg:width="45.51042in" svg:height="0.00139in" draw:z-index="0" draw:id="id3" draw:style-name="a3" draw:name="Horizontal Line 46" text:anchor-type="as-char"><svg:title/><svg:desc/><draw:enhanced-geometry draw:type="non-primitive" svg:viewBox="0 0 21600 21600" draw:enhanced-path="M 0 0 L 21600 0 21600 21600 0 21600 Z N"/></draw:custom-shape></text:p>
      <text:p text:style-name="P17">Why Book Stanley?</text:p>
      <text:p text:style-name="Normal">Stanley brings:</text:p>
      <text:p text:style-name="Normal">A powerful leadership message<text:line-break/>Real-world founder and CEO experience<text:line-break/>Insight into Africa, investment and global opportunity<text:line-break/>A values-based approach to leadership<text:line-break/>A passionate and engaging speaking style<text:line-break/><text:soft-page-break/>Experience across business, sport, leadership and community impact<text:line-break/>A message that inspires action, responsibility and legacy</text:p>
      <text:p text:style-name="Normal"><draw:custom-shape svg:x="0in" svg:y="0in" svg:width="45.51042in" svg:height="0.00139in" draw:z-index="0" draw:id="id4" draw:style-name="a4" draw:name="Horizontal Line 47" text:anchor-type="as-char"><svg:title/><svg:desc/><draw:enhanced-geometry draw:type="non-primitive" svg:viewBox="0 0 21600 21600" draw:enhanced-path="M 0 0 L 21600 0 21600 21600 0 21600 Z N"/></draw:custom-shape></text:p>
      <text:p text:style-name="P18">Featured Organisations</text:p>
      <text:p text:style-name="Normal">Founder &amp; CEO — Africa Investment Gateway Group<text:line-break/>Founder &amp; CEO — John Chamberlain Sports<text:line-break/>Founder &amp; Director — British International Institute for Leadership and Management</text:p>
      <text:p text:style-name="Normal"><draw:custom-shape svg:x="0in" svg:y="0in" svg:width="45.51042in" svg:height="0.00139in" draw:z-index="0" draw:id="id5" draw:style-name="a5" draw:name="Horizontal Line 48" text:anchor-type="as-char"><svg:title/><svg:desc/><draw:enhanced-geometry draw:type="non-primitive" svg:viewBox="0 0 21600 21600" draw:enhanced-path="M 0 0 L 21600 0 21600 21600 0 21600 Z N"/></draw:custom-shape></text:p>
      <text:p text:style-name="P19">Speaker Booking Enquiry</text:p>
      <text:p text:style-name="Normal">To invite Stanley Osuide to speak at your event, please complete the enquiry form below.</text:p>
      <text:p text:style-name="P20">Booking Form Fields</text:p>
      <text:p text:style-name="Normal">Full Name<text:line-break/>Organisation<text:line-break/>Email Address<text:line-break/>Phone Number<text:line-break/>Event Name<text:line-break/>Event Date<text:line-break/>Event Location<text:line-break/>Expected Audience Size<text:line-break/>Type of Event<text:line-break/>Speaking Topic of Interest<text:line-break/>Budget Range<text:line-break/>Additional Information</text:p>
      <text:p text:style-name="Normal">[Submit Booking Enquiry]</text:p>
      <text:p text:style-name="Normal"><draw:custom-shape svg:x="0in" svg:y="0in" svg:width="45.51042in" svg:height="0.00139in" draw:z-index="0" draw:id="id6" draw:style-name="a6" draw:name="Horizontal Line 49" text:anchor-type="as-char"><svg:title/><svg:desc/><draw:enhanced-geometry draw:type="non-primitive" svg:viewBox="0 0 21600 21600" draw:enhanced-path="M 0 0 L 21600 0 21600 21600 0 21600 Z N"/></draw:custom-shape></text:p>
      <text:p text:style-name="P21">Call to Action</text:p>
      <text:p text:style-name="Normal">Bring Stanley Osuide to your next event and inspire your audience to lead with purpose, build with vision and create lasting legacy.</text:p>
      <text:p text:style-name="Normal"><text:span text:style-name="T22">Book Stanley Osuide for an international speaking engagement today.</text:span></text:p>
      <text:p text:style-name="Normal">Email: [Insert Email]<text:line-break/>Phone: [Insert Phone Number]<text:line-break/>Website: [Insert Websi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 Security</meta:initial-creator>
    <dc:creator>AS Security</dc:creator>
    <meta:creation-date>2026-07-03T07:26:00Z</meta:creation-date>
    <dc:date>2026-07-03T07:28:00Z</dc:date>
    <meta:template xlink:href="Normal" xlink:type="simple"/>
    <meta:editing-cycles>1</meta:editing-cycles>
    <meta:editing-duration>PT120S</meta:editing-duration>
    <meta:document-statistic meta:page-count="3" meta:paragraph-count="7" meta:word-count="590" meta:character-count="3952" meta:row-count="28" meta:non-whitespace-character-count="3369"/>
  </office:meta>
</office:document-meta>
</file>